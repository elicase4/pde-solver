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Times New Roman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8c7a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33" loext:opacity="100%" fo:letter-spacing="normal"/>
    </style:style>
    <style:style style:name="T1" style:family="text">
      <style:text-properties officeooo:rsid="001c3c58"/>
    </style:style>
    <style:style style:name="T2" style:family="text">
      <style:text-properties officeooo:rsid="001d8c7a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officeooo:rsid="001c3c58"/>
    </style:style>
    <style:style style:name="T5" style:family="text">
      <style:text-properties style:use-window-font-color="true" loext:opacity="0%" officeooo:rsid="001d8c7a"/>
    </style:style>
    <style:style style:name="T6" style:family="text">
      <style:text-properties officeooo:rsid="001e1fe4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in" svg:y="-1.0417in" svg:width="0.0161in" draw:z-index="0">
        <draw:text-box fo:min-height="0.0161in">
          <text:p text:style-name="P2"> </text:p>
        </draw:text-box>
      </draw:frame>
      <text:p text:style-name="P1"><text:bookmark text:name="et-ef-content-ftf-gp-j_id_id16pc9-page_0-preq-j_id_id7pc10-page__1-q-j_id_id2pc11-5-qtd"/><text:span text:style-name="T3">In the space provided, please tell us what interests you about working in the built environment and why you specifically want to work at Arup?<text:line-break/><text:line-break/></text:span><text:span text:style-name="T4">I am particularly drawn to A</text:span><text:span text:style-name="T5">rup</text:span><text:span text:style-name="T4"> because of its unique integration of architecture and engineering across a broad and impressive project portfolio. My interests in transportation infrastructure, architecture, structural engineering, and industrial projects align well with Arup’s offerings, making it an ideal place to start my career. </text:span></text:p>
      <text:p text:style-name="P1"><text:span text:style-name="T4"/></text:p>
      <text:p text:style-name="P1">Arup’s opportunities for new graduates are particularly appealing, as they allow me to apply my hands-on experience and computational expertise across a wide variety of projects. The chance to work on initiatives at different stages, from design to <text:span text:style-name="T6">construction </text:span>excites me, as does the opportunity to grow professionally by contributing to Arup's already impressive body of work.</text:p>
      <text:p text:style-name="Standard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Times New Roman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8:20:34.038778220</meta:creation-date>
    <dc:date>2024-10-21T23:07:32.724781941</dc:date>
    <meta:editing-duration>PT22H38M12S</meta:editing-duration>
    <meta:editing-cycles>9</meta:editing-cycles>
    <meta:generator>LibreOffice/24.2.6.2$Linux_X86_64 LibreOffice_project/420$Build-2</meta:generator>
    <meta:document-statistic meta:table-count="0" meta:image-count="0" meta:object-count="0" meta:page-count="1" meta:paragraph-count="3" meta:word-count="129" meta:character-count="859" meta:non-whitespace-character-count="729"/>
  </office:meta>
</office:document-meta>
</file>